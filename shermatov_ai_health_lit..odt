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Verdana" svg:font-family="Verdana" style:font-family-generic="swiss" style:font-pitch="variable"/>
  </office:font-face-decls>
  <office:automatic-styles>
    <style:style style:name="P1" style:family="paragraph" style:parent-style-name="Standard">
      <style:paragraph-properties fo:margin-left="0.5in" fo:text-align="center" style:justify-single-word="false" fo:text-indent="-0.25in" style:auto-text-indent="false"/>
    </style:style>
    <style:style style:name="P2" style:family="paragraph" style:parent-style-name="List_20_Paragraph" style:list-style-name="WWNum1"/>
    <style:style style:name="P3" style:family="paragraph" style:parent-style-name="List_20_Paragraph" style:list-style-name="WWNum1">
      <style:paragraph-properties fo:margin-top="0in" fo:margin-bottom="0in" style:contextual-spacing="true" fo:line-height="100%"/>
    </style:style>
    <style:style style:name="P4" style:family="paragraph" style:parent-style-name="List_20_Paragraph" style:list-style-name="WWNum1">
      <style:paragraph-properties fo:margin-top="0in" fo:margin-bottom="0in" style:contextual-spacing="true" fo:line-height="100%"/>
      <style:text-properties officeooo:paragraph-rsid="000bd651"/>
    </style:style>
    <style:style style:name="P5" style:family="paragraph" style:parent-style-name="List_20_Paragraph" style:list-style-name="WWNum1">
      <style:paragraph-properties fo:margin-top="0in" fo:margin-bottom="0in" style:contextual-spacing="true" fo:line-height="100%"/>
      <style:text-properties officeooo:paragraph-rsid="000ef03a"/>
    </style:style>
    <style:style style:name="P6" style:family="paragraph" style:parent-style-name="Standard" style:list-style-name="WWNum1">
      <style:paragraph-properties fo:margin-top="0in" fo:margin-bottom="0in" style:contextual-spacing="true" fo:line-height="100%"/>
      <style:text-properties officeooo:paragraph-rsid="0011c2d5"/>
    </style:style>
    <style:style style:name="P7" style:family="paragraph" style:parent-style-name="Standard" style:list-style-name="WWNum1">
      <style:paragraph-properties fo:margin-top="0in" fo:margin-bottom="0in" style:contextual-spacing="true" fo:line-height="100%" style:writing-mode="lr-tb" style:writing-mode-automatic="false"/>
      <style:text-properties officeooo:paragraph-rsid="0011c2d5"/>
    </style:style>
    <style:style style:name="P8" style:family="paragraph" style:parent-style-name="Standard" style:list-style-name="WWNum1">
      <style:paragraph-properties fo:margin-top="0in" fo:margin-bottom="0in" style:contextual-spacing="true" fo:line-height="100%"/>
      <style:text-properties officeooo:paragraph-rsid="0013819d"/>
    </style:style>
    <style:style style:name="P9" style:family="paragraph" style:parent-style-name="Standard">
      <style:paragraph-properties fo:margin-top="0in" fo:margin-bottom="0in" style:contextual-spacing="false" fo:line-height="100%"/>
    </style:style>
    <style:style style:name="P10" style:family="paragraph" style:parent-style-name="Standard">
      <style:paragraph-properties fo:margin-top="0in" fo:margin-bottom="0in" style:contextual-spacing="false" fo:line-height="100%" fo:break-before="page"/>
    </style:style>
    <style:style style:name="P11" style:family="paragraph" style:parent-style-name="List_20_Paragraph" style:list-style-name="WWNum2"/>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000000" loext:opacity="100%" fo:font-family="Verdana-Bold" style:font-family-generic="roman" style:font-pitch="variable" fo:font-size="10pt" fo:font-weight="bold" style:letter-kerning="false" style:font-family-asian="'Times New Roman'" style:font-family-generic-asian="system" style:font-pitch-asian="variable" style:font-size-asian="10pt" style:font-weight-asian="bold" style:font-family-complex="'Times New Roman'" style:font-family-generic-complex="system" style:font-pitch-complex="variable" style:font-size-complex="10pt" style:font-weight-complex="bold"/>
    </style:style>
    <style:style style:name="T4" style:family="text">
      <style:text-properties fo:color="#000000" loext:opacity="100%" style:font-name="Verdana" fo:font-size="10pt" style:letter-kerning="false" style:font-family-asian="'Times New Roman'" style:font-family-generic-asian="system" style:font-pitch-asian="variable" style:font-size-asian="10pt" style:font-family-complex="'Times New Roman'" style:font-family-generic-complex="system" style:font-pitch-complex="variable" style:font-size-complex="10pt"/>
    </style:style>
    <style:style style:name="T5" style:family="text">
      <style:text-properties fo:language="it" fo:country="IT"/>
    </style:style>
    <style:style style:name="T6" style:family="text">
      <style:text-properties fo:font-style="italic" style:font-style-asian="italic" style:font-style-complex="italic"/>
    </style:style>
    <style:style style:name="T7" style:family="text">
      <style:text-properties officeooo:rsid="000bd651"/>
    </style:style>
    <style:style style:name="T8" style:family="text">
      <style:text-properties fo:color="#0000ff"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Literature:</text:span><text:span text:style-name="T1"/></text:p>
      <text:list text:style-name="WWNum1">
        <text:list-item>
          <text:p text:style-name="P2">European Council (2024) AI act: Council gives final green light to the first worldwide rules on AI</text:p>
        </text:list-item>
        <text:list-item>
          <text:p text:style-name="P2">European Council (2025) EHDS: Council adopts new regulation improving cross-border access to EU health data.</text:p>
        </text:list-item>
        <text:list-item>
          <text:p text:style-name="P2">European Council (2024) EU brings product liability rules in line with digital age and circular economy</text:p>
        </text:list-item>
        <text:list-item>
          <text:p text:style-name="P2">Zhang and Kamel, 2023. Generative AI in Medicine and Healthcare: Promises, Opportunities and Challenges</text:p>
        </text:list-item>
        <text:list-item>
          <text:p text:style-name="P2">Roppelt, J.S., Kanbach, D.K. and Kraus, S., 2024. Artificial intelligence in healthcare institutions: A systematic literature review on influencing factors.</text:p>
        </text:list-item>
        <text:list-item>
          <text:p text:style-name="P2"><text:span text:style-name="T1">The Medical Device Regulation (MDR) | The </text:span><text:span text:style-name="T2">In Vitro </text:span><text:span text:style-name="T1">Diagnostic Medical Devices Regulation (IVDR) | Health Technology Assessment Regulation (HTAR) | European Health Data Space (EHDS)</text:span></text:p>
        </text:list-item>
        <text:list-item>
          <text:p text:style-name="P3">Regulation (EU) 2024/1689 of the European Parliament and of the Council of 13 June 2024 laying down harmonised rules on artificial intelligence and amending Regulations (EC) No 300/2008, (EU) No 167/2013, (EU) No 168/2013, (EU) 2018/858, (EU) 2018/1139 and (EU) 2019/2144 and Directives 2014/90/EU, (EU) 2016/797 and (EU) 2020/1828 (Artificial Intelligence Act)</text:p>
        </text:list-item>
        <text:list-item>
          <text:p text:style-name="P3">CORDIS database: AI in healthcare EU funded projects</text:p>
        </text:list-item>
        <text:list-item>
          <text:p text:style-name="P3">Before medical hardware or software can be legally introduced to the US market, the parent company must submit it to the FDA for evaluation. Depending on the devices' risks, the FDA centrally approves medical devices through three pathways: the premarket approval pathway (the most rigorous review for high-risk devices), the de novo premarket review (for low and moderate-risk devices), and the 510(k) pathway, each of which needs specific criteria to be fulfilled to be granted to be granted.</text:p>
        </text:list-item>
        <text:list-item>
          <text:p text:style-name="P3">Apell et al., 2023. Artificial intelligence (AI) healthcare technology innovations: the current state and challenges from a life science industry perspective.</text:p>
        </text:list-item>
        <text:list-item>
          <text:p text:style-name="P3">Bajwa et al., 2021. Artificial intelligence in healthcare: transforming the practice of medicine</text:p>
        </text:list-item>
        <text:list-item>
          <text:p text:style-name="P3">To support the computational demands of AI, <text:span text:style-name="T1">robust IT infrastructure </text:span>that includes high-performance computing (HPC) clusters, advanced data storage solutions, high-speed networks, and resilient systems was indicated by stakeholders as important: Noorbakhsh-Sabet et al., 2019. Artificial intelligence transforms the future of health care.</text:p>
        </text:list-item>
        <text:list-item>
          <text:p text:style-name="P3">AI platforms are limited by the quality of the data inputs they receive, implying that the algorithm is only as good as the data source “teaching” it: Singh et al., 2020. Current challenges and barriers to real-world artificial intelligence adoption for the healthcare system, provider, and the patient.</text:p>
        </text:list-item>
        <text:list-item>
          <text:p text:style-name="P3">The <text:span text:style-name="T1">performance of AI models can decline </text:span>over time due to shifts in local input data, changes to infrastructure or protocols, software updates, or naturally occurring changes in patient populations and demographics: Pianykh et al., 2020. Continuous learning AI in radiology: implementation principles and early applications.</text:p>
        </text:list-item>
        <text:list-item>
          <text:p text:style-name="P3"><text:span text:style-name="T3">Revealing the process </text:span><text:span text:style-name="T4">of how the algorithm was developed, who was involved in the development process, whether clinicians were consulted, and how the data was </text:span><text:soft-page-break/><text:span text:style-name="T4">processed: </text:span>Watson et al., 2020. Overcoming barriers to the adoption and implementation of predictive modelling and machine learning in clinical care: what can we learn from US academic medical centers?</text:p>
        </text:list-item>
        <text:list-item>
          <text:p text:style-name="P3">Regulation (EU) 2024/1689 of the European Parliament and of the Council of 13 June 2024 laying down harmonised rules on artificial intelligence and amending Regulations (EC) No 300/2008, (EU) No 167/2013, (EU) No 168/2013, (EU) 2018/858, (EU) 2018/1139 and (EU) 2019/2144 and Directives 2014/90/EU, (EU) 2016/797 and (EU) 2020/1828 (Artificial Intelligence Act): sets standards for, among others, high-risk AI systems (see section 5.1.3 for the different risk categories covered by the AIA), ensuring <text:span text:style-name="T1">transparency</text:span>, <text:span text:style-name="T1">robust risk management</text:span>, and <text:span text:style-name="T1">accountability throughout the AI lifecycle.</text:span></text:p>
        </text:list-item>
        <text:list-item>
          <text:p text:style-name="P3">The role of public external knowledge for firm innovativeness: The role of public external knowledge for firm innovativeness</text:p>
        </text:list-item>
        <text:list-item>
          <text:p text:style-name="P3"><text:span text:style-name="T5">Arora, A., Belenzon, S., Patacconi, A., 2018. </text:span>The decline of science in corporate R&amp;D. Strateg. Manag. J. 39 (1), 3–32.: firms are increasingly relying more on external rather than internal knowledge to generate innovations, and a firm’s absorptive capacity (that is internal capabilities) is becoming fundamental for integrating this external knowledge.</text:p>
        </text:list-item>
        <text:list-item>
          <text:p text:style-name="P3">Knowledge from PROs and universities is a fundamental part of firms’ external knowledge flows (Arvanitis et al., 2008; Caloghirou et al., 2021; Cohen et al., 2002; Gonz´ alez-Pernía et al., 2015; Tether and Tajar 2008): </text:p>
          <text:list>
            <text:list-item>
              <text:p text:style-name="P3">Arvanitis, S., Kubli, U., Woerter, M., 2008. University-industry knowledge and technology transfer in Switzerland: what university scientists think about co-operation with private enterprises. Res. Policy 37 (10), 1865–1883</text:p>
            </text:list-item>
            <text:list-item>
              <text:p text:style-name="P3">Caloghirou, Y., Giotopoulos, I., Kontolaimou, A., Korra, E., Tsakanikas, A., 2021. Industry-university knowledge flows and product innovation: how do knowledge stocks and crisis matter? Res. Policy 50 (3), 104195.</text:p>
            </text:list-item>
            <text:list-item>
              <text:p text:style-name="P3">Cohen, W.M., Nelson, R.R., Walsh, J.P., 2002. Links and impacts: the influence of public research on industrial R&amp;D. Manag. Sci. 48 (1), 1–23.</text:p>
            </text:list-item>
            <text:list-item>
              <text:p text:style-name="P3">Gonz´alez-Pernía, J.L., Parrilli, M.D., Pena-Legazkue, ˜ I., 2015. STI–DUI learning modes, firm–university collaboration and innovation. J. Technol. Transf. 40 (3), 475–492.</text:p>
            </text:list-item>
            <text:list-item>
              <text:p text:style-name="P3">Tether, B.S., Tajar, A., 2008. Beyond industry–university links: sourcing knowledge for innovation from consultants, private research organisations and the public science-base. Res. Policy 37 (6–7), 1079–1095.</text:p>
            </text:list-item>
          </text:list>
        </text:list-item>
        <text:list-item>
          <text:p text:style-name="P3">While the impact of university-industry collaboration on firms’ innovation performance has been analyzed previously (Yu and Lee, 2017; Szücs, 2018; Kafouros et al., 2015; Vega-Jurado et al., 2017; García-Vega and Vicente-Chirivella, 2020; Anon, 2016)</text:p>
          <text:list>
            <text:list-item>
              <text:p text:style-name="P3">Yu, G.J., Lee, J., 2017. When should a firm collaborate with research organizations for innovation performance? The moderating role of innovation orientation, size, and age. J. Technol. Transf. 42 (6), 1451–1465.</text:p>
            </text:list-item>
            <text:list-item>
              <text:p text:style-name="P3">Szücs, F., 2018. Research subsidies, industry–university cooperation and innovation. Res. Policy 47 (7), 1256–1266.</text:p>
            </text:list-item>
            <text:list-item>
              <text:p text:style-name="P3">Kafouros, M., Wang, C., Piperopoulos, P., Zhang, M., 2015. Academic collaborations and firm innovation performance in China: the role of region-specific institutions. Res. Policy 44 (3), 803–817.</text:p>
            </text:list-item>
            <text:list-item>
              <text:p text:style-name="P3"><text:soft-page-break/>Vega-Jurado, J., Kask, S., Manjarr´es-Henriquez, L., 2017. University industry links and product innovation: cooperate or contract. J. Technol. Manag. Innov. 12 (3), 1–8.</text:p>
            </text:list-item>
            <text:list-item>
              <text:p text:style-name="P3"><text:span text:style-name="T5">García-Vega, M., Vicente-Chirivella, O., 2020. </text:span>Do university technology transfers increase firms’ innovation? Eur. Econ. Rev. 123, 103388.</text:p>
            </text:list-item>
            <text:list-item>
              <text:p text:style-name="P3">Anon Higon, D.A., 2016. In-house versus external basic research and first-to-market innovations. Res. Policy 45 (4), 816–829.</text:p>
            </text:list-item>
          </text:list>
        </text:list-item>
        <text:list-item>
          <text:p text:style-name="P3">Perkmann, M., Tartari, V., McKelvey, M., Autio, E., Brostrom, A., D’Este, P., Sobrero, M., 2013. Academic engagement and commercialisation: a review of the literature on university–industry relations. Res. Policy 42 (2), 423–442.</text:p>
        </text:list-item>
        <text:list-item>
          <text:p text:style-name="P3">Perkmann, M., Walsh, K., 2007. University–industry relationships and open innovation: towards a research agenda. Int. J. Manag. Rev. 9 (4), 259–280</text:p>
        </text:list-item>
        <text:list-item>
          <text:p text:style-name="P3">Barge-Gil and Vivas-Augier (2019) compare the effect on sales from new-to-the-market products for firms collaborating with universities and those collaborating with knowledge-intensive business services: Barge-Gil, A., Vivas-Augier, C., 2019. Does Cooperation with Universities and KIBS Matter? Firm-level Evidence from Spain, 96949. University Library of Munich, Germany.</text:p>
        </text:list-item>
        <text:list-item>
          <text:p text:style-name="P3">Capron and Cincera (2004) study the determinants that explain the use of difference sources of information, including universities: Capron, H., Cincera, M., 2004. Industry/university S&amp;T transfers: what can we learn from Belgian CIS-2 data? Brussels Econ. Rev. 46 (3), 59–86. Available at SSRN 637185.</text:p>
        </text:list-item>
        <text:list-item>
          <text:p text:style-name="P3">Fudickar and Hottenrott (2019) investigate the impact of formal and informal interactions with publicly funded scientific research on the innovativeness of German start-ups. They find that firms engaged in these interactions were more likely to introduce new products and services to the market and that absorptive capacities played a fundamental moderating role for the effectiveness of technological collaborations: Fudickar, R., Hottenrott, H., 2019. Public research and the innovation performance of new technology based firms. J. Technol. Transf. 44 (2), 326–358</text:p>
        </text:list-item>
        <text:list-item>
          <text:p text:style-name="P3">I find this fantastic:<text:line-break/>Early work on the sources of productivity growth revealed that growth in capital and labor explained less than half of such growth in the United States and many other countries. The remainder (the ‘residual’) was ascribed to technical change and a large literature grew up that attempted to find measures for technical change (improvements in capital and labor quality, R&amp;D activities, and so forth) and use these measures to try to explain the residual growth in productivity (Griliches 1996, 1998, among others). Considerable success has been achieved by this approach, to the extent that many countries are now moving to incorporate measures of R&amp;D capital stock in their systems of national income accounts, and therefore to directly attribute some of economic growth to its contribution as well as adding the creation of knowledge capital to output itself (Bronwyn H. Hall, 2011)</text:p>
        </text:list-item>
        <text:list-item>
          <text:p text:style-name="P3">Most work rely on innovation on survey data: (Bronwyn H. Hall, 2011; Hall, Mairesse, and Mohnen (2010); Crepon, B., E. Duguet, and J. Mairesse, 1998; Hall, B. H., J. Mairesse, and P. Mohnen (2010). Measuring the Returns to R&amp;D. In Hall, B. H. and N. Rosenberg, Handbook of the Economics of Innovation, pp. 1034-1076. Amsterdam and New York: Elsevier; Mairesse, J., and S. Robin (2010). Innovation and Productivity: a <text:soft-page-break/>Firm-Level Analysis for French Manufacturing and Services Using CIS3 and CIS4 data (1998-2000 and 2002-2004). Paris, France: CREST-ENSAE.</text:p>
        </text:list-item>
        <text:list-item>
          <text:p text:style-name="P3">Using robot shipment data at the country, industry and year level from the International Federation of Robotics (IFR), Graetz and Michaels (2015) find large effects on productivity growth. Looking at national-level data on robot shipments across 17 countries, Graetz and Michaels show that robots may be responsible for roughly one-tenth of the increases in the gross domestic product of these countries between 1993 and 2007 and may have increased productivity growth by more than 15 percent: Graetz, Georg and Guy Michaels (2015) “Robots at Work,” <text:span text:style-name="T6">Centre for Economic Performance Discussion Paper No. 1335</text:span>.</text:p>
        </text:list-item>
        <text:list-item>
          <text:p text:style-name="P3">Robert Seamans and Manav Raj, 2018: need for firm-level data.</text:p>
        </text:list-item>
        <text:list-item>
          <text:p text:style-name="P3">Gordon (2016) and Byrne, Oliner and Sichel (2013), Andrews et al. (2016) – Productivity slowdown. = be back</text:p>
        </text:list-item>
        <text:list-item>
          <text:p text:style-name="P3">The large within-industry productivity <text:span text:style-name="T6">dispersion </text:span>commonly found in the firm-level productivity literature (Syverson (2011)) may reflect many factors and mechanisms: idiosyncratic productivity shocks, managerial ability and practices, frictions, distortions, degree of competition, economies of scope, and product differentiation.</text:p>
        </text:list-item>
        <text:list-item>
          <text:p text:style-name="P3">the context of the surge in U.S. productivity in the 1990s to early 2000s and the subsequent productivity slowdown (Fernald (2014), Byrne, Sichel and Reinsdorf (2016), and Andrews et al. (2016)). Some have hypothesized that this reflects a slowdown in the pace and implementation of innovation and technological change especially in the IT intensive sectors (Gordon (2016) and Byrne, Oliner and Sichel (2013))</text:p>
        </text:list-item>
        <text:list-item>
          <text:p text:style-name="P3">Related theoretical models that highlight the role of entrants and young firms for innovation in models of creative destruction include Acemoglu et al. (2017)</text:p>
        </text:list-item>
        <text:list-item>
          <text:p text:style-name="P3">To investigate these issues we use the Dynamic Olley-Pakes (DOP) decomposition developed by Melitz and Polanec (2015).</text:p>
        </text:list-item>
        <text:list-item>
          <text:p text:style-name="P4">Improvements in medical technology have been a primary driver of increased life expectancy and medical spending (Newhouse 1992; Cutler 2004) <text:line-break/><text:span text:style-name="T7">[</text:span>Newhouse, J.P., 1992. Medical care costs: how much welfare loss? Journal of Economic Perspectives 6, 3-21 <text:line-break/>Cutler, D.M., 2004. Your money or your life: Strong medicine for America's health care system. Oxford University Press <text:span text:style-name="T7">]</text:span></text:p>
        </text:list-item>
        <text:list-item>
          <text:p text:style-name="P5">Nordhaus, W.D., 1969. An economic theory of technological change. The American Economic Review 59, 18-28 <text:line-break/>Policymakers and economists alike believe that without the market power created by this market exclusivity, firms would underinvest in the development of new technologies (Nordhaus 1969). A robust empirical literature supports this belief by demonstrating that increased market opportunities drive investments in research and development: See, e.g., Ward &amp; Dranove (1995), Acemoglu &amp; Linn (2004), Finkelstein (2004), Blume-Kohout &amp; Sood (2013), and Dranove et al. (2020). </text:p>
        </text:list-item>
        <text:list-item>
          <text:p text:style-name="P5">As a general rule, technologies that improve the efficiency of production tend to interact with competitive effects to encourage their adoption. For instance, a process innovation that lowers marginal costs or raises factor productivity, will be adopted by competitive firms, in part, because the profits of non-adoptees fall as others adopt; that is, adoptees create negative external effects on non-adoptees. As more firms adopt, prices fall as do <text:soft-page-break/>the profits of those who do not adopt. This paper demonstrates that this general rule does not generally apply to artificial intelligence (AI).</text:p>
        </text:list-item>
        <text:list-item>
          <text:p text:style-name="P6">In particular, we construct two measures of firms’ data assets following the prior literature (<text:span text:style-name="T8">Begenau et al. </text:span>(<text:span text:style-name="T8">2018</text:span>), <text:span text:style-name="T8">Farboodi et al. </text:span>(<text:span text:style-name="T8">2019</text:span>), <text:span text:style-name="T8">Eeckhout and Veldkamp </text:span>(<text:span text:style-name="T8">2022</text:span>), <text:span text:style-name="T8">Farboodi and Veldkamp </text:span>(<text:span text:style-name="T8">2023</text:span>), and <text:span text:style-name="T8">Abis and Veldkamp </text:span>(<text:span text:style-name="T8">2023</text:span>)), and we show that Generative AI exposure boosts firm value significantly more if the firm has greater data assets. This finding also explains why firms’ potential benefits from Generative AI are not expected to be entirely competed away by new entrants, as data assets can be highly specific to, or proprietary property of, incumbent firms - Andrea L. Eisfeldt, Gregor Schubert, and Miao Ben Zhang, "Generative AI and Firm Values," NBER Working Paper 31222 (2023), <text:a xlink:type="simple" xlink:href="https://doi.org/10.3386/w31222" text:style-name="Internet_20_link" text:visited-style-name="Visited_20_Internet_20_Link">https://doi.org/10.3386/w31222</text:a>.<text:line-break/><text:line-break/>-Begenau, Juliane, Maryam Farboodi, and Laura Veldkamp, 2018, Big data in finance and the growth of large firms, Journal of Monetary Economics 97, 71–87.<text:line-break/>-Farboodi, Maryam, Roxana Mihet, Thomas Philippon, and Laura Veldkamp, 2019, Big</text:p>
          <text:p text:style-name="P6">data and firm dynamics, in AEA papers and proceedings, volume 109, 38–42, American Economic Association 2014 Broadway, Suite 305, Nashville, TN 37203.</text:p>
          <text:p text:style-name="P7">-Farboodi, Maryam, and Laura Veldkamp, 2023, Data and markets, Annual Review of Economics 15, 23–40.</text:p>
          <text:p text:style-name="P6">-Eeckhout, Jan, and Laura Veldkamp, 2022, Data and market power, Technical report, National Bureau of Economic Research.</text:p>
          <text:p text:style-name="P8">-Abis, Simona, and Laura Veldkamp, 2023, The changing economics of knowledge production, Review of Financial Studies.</text:p>
          <text:p text:style-name="P8"/>
        </text:list-item>
        <text:list-item>
          <text:p text:style-name="P8">Babina, Tania, Anastassia Fedyk, Alex He, and James Hodson, 2024, Artificial intelligence, firm growth, and product innovation, Journal of Financial Economics 151, 103745.</text:p>
        </text:list-item>
      </text:list>
      <text:p text:style-name="P9"/>
      <text:p text:style-name="Standard"/>
      <text:p text:style-name="P10"/>
      <text:p text:style-name="Standard"/>
      <text:p text:style-name="P10">Growth of AI medical devices.</text:p>
      <text:p text:style-name="P9"/>
      <text:list text:style-name="WWNum2">
        <text:list-item>
          <text:p text:style-name="P11">There is a need for healthcare systems to harness the vast amounts of data generated by modern diagnostic systems: PwC. How artificial intelligence may improve quality and efficiency, whilst reducing healthcare costs in Europe.</text:p>
        </text:list-item>
        <text:list-item>
          <text:p text:style-name="P11">It is estimated by the World Economic Forum that 97% of the health data assets are not utilised. | AI has the potential to unlock patient value and efficiently manage unused data assets (e.g., imaging, patient histories) to assist HCPs in diagnosing and optimising treatment for patients: Thomason, J, 2021. Big tech, big data and the new world of digital health.</text:p>
        </text:list-item>
        <text:list-item>
          <text:p text:style-name="P11"/>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6%" fo:text-align="lef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omment" style:family="paragraph" style:parent-style-name="Standard" style:class="extra">
      <style:paragraph-properties fo:margin-left="0.0394in" fo:margin-right="0.0394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fontstyle01" style:family="text" style:parent-style-name="Default_20_Paragraph_20_Font">
      <style:text-properties fo:color="#000000" loext:opacity="100%" style:font-name="Verdana" fo:font-family="Verdana" style:font-family-generic="swiss" style:font-pitch="variable" fo:font-size="8pt" fo:font-style="normal" fo:font-weight="normal" style:font-size-asian="8pt" style:font-style-asian="normal" style:font-weight-asian="normal" style:font-size-complex="8pt" style:font-style-complex="normal" style:font-weight-complex="normal"/>
    </style:style>
    <style:style style:name="fontstyle21" style:family="text" style:parent-style-name="Default_20_Paragraph_20_Font">
      <style:text-properties fo:color="#000000" loext:opacity="100%" style:font-name="Verdana" fo:font-family="Verdana" style:font-family-generic="swiss" style:font-pitch="variable" fo:font-size="10pt" fo:font-style="normal" fo:font-weight="normal" style:font-size-asian="10pt" style:font-style-asian="normal" style:font-weight-asian="normal" style:font-size-complex="10pt" style:font-style-complex="normal" style:font-weight-complex="norma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Fazliddin Shermatov</meta:initial-creator>
    <meta:editing-cycles>15</meta:editing-cycles>
    <meta:creation-date>2026-03-20T17:13:00</meta:creation-date>
    <dc:date>2026-06-02T15:13:27.569213400</dc:date>
    <meta:editing-duration>PT59M43S</meta:editing-duration>
    <meta:generator>LibreOffice/26.2.3.2$Windows_X86_64 LibreOffice_project/70e089b17412e4cb7773e41413306b17a2328c34</meta:generator>
    <meta:document-statistic meta:table-count="0" meta:image-count="0" meta:object-count="0" meta:page-count="7" meta:paragraph-count="59" meta:word-count="2310" meta:character-count="15480" meta:non-whitespace-character-count="13298"/>
    <meta:user-defined meta:name="AppVersion">16.0000</meta:user-defined>
    <meta:template xlink:type="simple" xlink:actuate="onRequest" xlink:title="Normal" xlink:href=""/>
  </office:meta>
</office:document-meta>
</file>